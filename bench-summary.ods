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summary" table:style-name="ta1">
        <table:shapes>
          <draw:frame draw:z-index="0" draw:style-name="gr1" draw:text-style-name="P1" svg:width="4.4039in" svg:height="2.248in" svg:x="7.9051in" svg:y="0.0315in">
            <draw:object draw:notify-on-update-of-ranges="'bench-summary'.A8:'bench-summary'.A13 'bench-summary'.C8:'bench-summary'.C13 'bench-summary'.D8:'bench-summary'.D13 'bench-summary'.E8:'bench-summary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421in" svg:height="2.2063in" svg:x="3.4858in" svg:y="0.0524in">
            <draw:object draw:notify-on-update-of-ranges="'bench-summary'.A1:'bench-summary'.A1 'bench-summary'.A2:'bench-summary'.A5 'bench-summary'.B1:'bench-summary'.B1 'bench-summary'.B2:'bench-summary'.B5 'bench-summary'.C1:'bench-summary'.C1 'bench-summary'.C2:'bench-summary'.C5 'bench-summary'.D1:'bench-summary'.D1 'bench-summary'.D2:'bench-summary'.D5 'bench-summary'.E1:'bench-summary'.E1 'bench-summary'.E2:'bench-summary'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394in" svg:y="2.3508in">
            <draw:object draw:notify-on-update-of-ranges="'bench-summary'.A1:'bench-summary'.A1 'bench-summary'.A2:'bench-summary'.A13 'bench-summary'.B1:'bench-summary'.B1 'bench-summary'.B2:'bench-summary'.B13 'bench-summary'.C1:'bench-summary'.C1 'bench-summary'.C2:'bench-summary'.C13 'bench-summary'.D1:'bench-summary'.D1 'bench-summary'.D2:'bench-summary'.D13 'bench-summary'.E1:'bench-summary'.E1 'bench-summary'.E2:'bench-summary'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dapt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7" calcext:value-type="float">
            <text:p>23.7</text:p>
          </table:table-cell>
          <table:table-cell office:value-type="float" office:value="22.36" calcext:value-type="float">
            <text:p>22.36</text:p>
          </table:table-cell>
          <table:table-cell office:value-type="float" office:value="23.94" calcext:value-type="float">
            <text:p>23.94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4.66" calcext:value-type="float">
            <text:p>34.66</text:p>
          </table:table-cell>
          <table:table-cell office:value-type="float" office:value="65" calcext:value-type="float">
            <text:p>65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2" calcext:value-type="float">
            <text:p>42.62</text:p>
          </table:table-cell>
          <table:table-cell office:value-type="float" office:value="42.72" calcext:value-type="float">
            <text:p>42.72</text:p>
          </table:table-cell>
          <table:table-cell office:value-type="float" office:value="76" calcext:value-type="float">
            <text:p>76</text:p>
          </table:table-cell>
          <table:table-cell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2" calcext:value-type="float">
            <text:p>59.2</text:p>
          </table:table-cell>
          <table:table-cell office:value-type="float" office:value="55.12" calcext:value-type="float">
            <text:p>55.12</text:p>
          </table:table-cell>
          <table:table-cell office:value-type="float" office:value="92" calcext:value-type="float">
            <text:p>92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.76" calcext:value-type="float">
            <text:p>129.76</text:p>
          </table:table-cell>
          <table:table-cell office:value-type="float" office:value="102.42" calcext:value-type="float">
            <text:p>102.42</text:p>
          </table:table-cell>
          <table:table-cell office:value-type="float" office:value="196" calcext:value-type="float">
            <text:p>196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8.52" calcext:value-type="float">
            <text:p>418.52</text:p>
          </table:table-cell>
          <table:table-cell office:value-type="float" office:value="258.9" calcext:value-type="float">
            <text:p>258.9</text:p>
          </table:table-cell>
          <table:table-cell office:value-type="float" office:value="467" calcext:value-type="float">
            <text:p>467</text:p>
          </table:table-cell>
          <table:table-cell office:value-type="float" office:value="258.22" calcext:value-type="float">
            <text:p>258.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9.02" calcext:value-type="float">
            <text:p>1469.02</text:p>
          </table:table-cell>
          <table:table-cell office:value-type="float" office:value="696.92" calcext:value-type="float">
            <text:p>696.92</text:p>
          </table:table-cell>
          <table:table-cell office:value-type="float" office:value="1084" calcext:value-type="float">
            <text:p>1084</text:p>
          </table:table-cell>
          <table:table-cell office:value-type="float" office:value="701.02" calcext:value-type="float">
            <text:p>701.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337.56" calcext:value-type="float">
            <text:p>8337.56</text:p>
          </table:table-cell>
          <table:table-cell office:value-type="float" office:value="2785.62" calcext:value-type="float">
            <text:p>2785.62</text:p>
          </table:table-cell>
          <table:table-cell office:value-type="float" office:value="3017" calcext:value-type="float">
            <text:p>3017</text:p>
          </table:table-cell>
          <table:table-cell office:value-type="float" office:value="2815.6" calcext:value-type="float">
            <text:p>2815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243.86" calcext:value-type="float">
            <text:p>32243.86</text:p>
          </table:table-cell>
          <table:table-cell office:value-type="float" office:value="7027.66" calcext:value-type="float">
            <text:p>7027.66</text:p>
          </table:table-cell>
          <table:table-cell table:number-columns-repeated="2"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144.6" calcext:value-type="float">
            <text:p>127144.6</text:p>
          </table:table-cell>
          <table:table-cell office:value-type="float" office:value="19377.94" calcext:value-type="float">
            <text:p>19377.94</text:p>
          </table:table-cell>
          <table:table-cell table:number-columns-repeated="2" office:value-type="float" office:value="15068" calcext:value-type="float">
            <text:p>150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5092.78" calcext:value-type="float">
            <text:p>285092.78</text:p>
          </table:table-cell>
          <table:table-cell office:value-type="float" office:value="36226.4" calcext:value-type="float">
            <text:p>36226.4</text:p>
          </table:table-cell>
          <table:table-cell table:number-columns-repeated="2" office:value-type="float" office:value="25336" calcext:value-type="float">
            <text:p>25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5528.12" calcext:value-type="float">
            <text:p>505528.12</text:p>
          </table:table-cell>
          <table:table-cell office:value-type="float" office:value="57330.04" calcext:value-type="float">
            <text:p>57330.04</text:p>
          </table:table-cell>
          <table:table-cell table:number-columns-repeated="2" office:value-type="float" office:value="33136" calcext:value-type="float">
            <text:p>3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28T16:16:02.503075476</dc:date>
    <meta:editing-duration>PT1M23S</meta:editing-duration>
    <meta:editing-cycles>1</meta:editing-cycles>
    <meta:generator>LibreOffice/7.3.7.2$Linux_X86_64 LibreOffice_project/30$Build-2</meta:generator>
    <meta:document-statistic meta:table-count="1" meta:cell-count="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87cm" svg:height="5.711cm" xlink:href=".." xlink:type="simple" chart:class="chart:line" chart:style-name="ch1">
        <chart:legend chart:legend-position="end" svg:x="8.335cm" svg:y="2.058cm" style:legend-expansion="high" chart:style-name="ch2"/>
        <chart:plot-area chart:style-name="ch3" table:cell-range-address="'bench-summary'.A8:'bench-summary'.A13 'bench-summary'.C8:'bench-summary'.E13" chart:data-source-has-labels="column" svg:x="0.223cm" svg:y="0.114cm" svg:width="7.889cm" svg:height="5.483cm">
          <chart:coordinate-region svg:x="1.4cm" svg:y="0.313cm" svg:width="6.34cm" svg:height="4.637cm"/>
          <chart:axis chart:dimension="x" chart:name="primary-x" chart:style-name="ch4" chartooo:axis-type="auto">
            <chartooo:date-scale/>
            <chart:categories table:cell-range-address="'bench-summary'.A8:'bench-summary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'.C8:'bench-summary'.C13" chart:class="chart:line">
            <chart:data-point chart:repeated="6"/>
          </chart:series>
          <chart:series chart:style-name="ch7" chart:values-cell-range-address="'bench-summary'.D8:'bench-summary'.D13" chart:class="chart:line">
            <chart:data-point chart:repeated="6"/>
          </chart:series>
          <chart:series chart:style-name="ch8" chart:values-cell-range-address="'bench-summary'.E8:'bench-summary'.E1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bench-summary'.A8:'bench-summary'.A13</svg:desc>
                </draw:g>
              </table:table-cell>
              <table:table-cell office:value-type="float" office:value="696.92">
                <text:p>696.92</text:p>
                <draw:g>
                  <svg:desc>'bench-summary'.C8:'bench-summary'.C13</svg:desc>
                </draw:g>
              </table:table-cell>
              <table:table-cell office:value-type="float" office:value="1084">
                <text:p>1084</text:p>
                <draw:g>
                  <svg:desc>'bench-summary'.D8:'bench-summary'.D13</svg:desc>
                </draw:g>
              </table:table-cell>
              <table:table-cell office:value-type="float" office:value="701.02">
                <text:p>701.02</text:p>
                <draw:g>
                  <svg:desc>'bench-summary'.E8:'bench-summary'.E13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85.62">
                <text:p>2785.62</text:p>
              </table:table-cell>
              <table:table-cell office:value-type="float" office:value="3017">
                <text:p>3017</text:p>
              </table:table-cell>
              <table:table-cell office:value-type="float" office:value="2815.6">
                <text:p>2815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27.66">
                <text:p>7027.66</text:p>
              </table:table-cell>
              <table:table-cell office:value-type="float" office:value="6784">
                <text:p>6784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377.94">
                <text:p>19377.94</text:p>
              </table:table-cell>
              <table:table-cell office:value-type="float" office:value="15068">
                <text:p>15068</text:p>
              </table:table-cell>
              <table:table-cell office:value-type="float" office:value="15068">
                <text:p>150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6226.4">
                <text:p>36226.4</text:p>
              </table:table-cell>
              <table:table-cell office:value-type="float" office:value="25336">
                <text:p>25336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330.04">
                <text:p>57330.04</text:p>
              </table:table-cell>
              <table:table-cell office:value-type="float" office:value="33136">
                <text:p>33136</text:p>
              </table:table-cell>
              <table:table-cell office:value-type="float" office:value="33136">
                <text:p>33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3cm" svg:height="5.605cm" xlink:href=".." xlink:type="simple" chart:class="chart:line" chart:style-name="ch1">
        <chart:legend chart:legend-position="end" svg:x="7.807cm" svg:y="1.756cm" style:legend-expansion="high" chart:style-name="ch2"/>
        <chart:plot-area chart:style-name="ch3" table:cell-range-address="'bench-summary'.A1:'bench-summary'.E5" chart:data-source-has-labels="both" svg:x="0.22cm" svg:y="0.112cm" svg:width="7.367cm" svg:height="5.381cm">
          <chart:coordinate-region svg:x="1.027cm" svg:y="0.311cm" svg:width="6.373cm" svg:height="4.535cm"/>
          <chart:axis chart:dimension="x" chart:name="primary-x" chart:style-name="ch4" chartooo:axis-type="auto">
            <chartooo:date-scale/>
            <chart:categories table:cell-range-address="'bench-summary'.A2:'bench-summary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'.B2:'bench-summary'.B5" chart:label-cell-address="'bench-summary'.B1:'bench-summary'.B1" chart:class="chart:line">
            <chart:data-point chart:repeated="4"/>
          </chart:series>
          <chart:series chart:style-name="ch7" chart:values-cell-range-address="'bench-summary'.C2:'bench-summary'.C5" chart:label-cell-address="'bench-summary'.C1:'bench-summary'.C1" chart:class="chart:line">
            <chart:data-point chart:repeated="4"/>
          </chart:series>
          <chart:series chart:style-name="ch8" chart:values-cell-range-address="'bench-summary'.D2:'bench-summary'.D5" chart:label-cell-address="'bench-summary'.D1:'bench-summary'.D1" chart:class="chart:line">
            <chart:data-point chart:repeated="4"/>
          </chart:series>
          <chart:series chart:style-name="ch9" chart:values-cell-range-address="'bench-summary'.E2:'bench-summary'.E5" chart:label-cell-address="'bench-summary'.E1:'bench-summary'.E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'.B1:'bench-summary'.B1</svg:desc>
                </draw:g>
              </table:table-cell>
              <table:table-cell office:value-type="string">
                <text:p>intermediate</text:p>
                <draw:g>
                  <svg:desc>'bench-summary'.C1:'bench-summary'.C1</svg:desc>
                </draw:g>
              </table:table-cell>
              <table:table-cell office:value-type="string">
                <text:p>complex</text:p>
                <draw:g>
                  <svg:desc>'bench-summary'.D1:'bench-summary'.D1</svg:desc>
                </draw:g>
              </table:table-cell>
              <table:table-cell office:value-type="string">
                <text:p>adaptative</text:p>
                <draw:g>
                  <svg:desc>'bench-summary'.E1:'bench-summary'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ench-summary'.A2:'bench-summary'.A5</svg:desc>
                </draw:g>
              </table:table-cell>
              <table:table-cell office:value-type="float" office:value="23.7">
                <text:p>23.7</text:p>
                <draw:g>
                  <svg:desc>'bench-summary'.B2:'bench-summary'.B5</svg:desc>
                </draw:g>
              </table:table-cell>
              <table:table-cell office:value-type="float" office:value="22.36">
                <text:p>22.36</text:p>
                <draw:g>
                  <svg:desc>'bench-summary'.C2:'bench-summary'.C5</svg:desc>
                </draw:g>
              </table:table-cell>
              <table:table-cell office:value-type="float" office:value="23.94">
                <text:p>23.94</text:p>
                <draw:g>
                  <svg:desc>'bench-summary'.D2:'bench-summary'.D5</svg:desc>
                </draw:g>
              </table:table-cell>
              <table:table-cell office:value-type="float" office:value="23.88">
                <text:p>23.88</text:p>
                <draw:g>
                  <svg:desc>'bench-summary'.E2:'bench-summary'.E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34.66">
                <text:p>34.66</text:p>
              </table:table-cell>
              <table:table-cell office:value-type="float" office:value="65">
                <text:p>65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62">
                <text:p>42.62</text:p>
              </table:table-cell>
              <table:table-cell office:value-type="float" office:value="42.72">
                <text:p>42.72</text:p>
              </table:table-cell>
              <table:table-cell office:value-type="float" office:value="76">
                <text:p>76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.2">
                <text:p>59.2</text:p>
              </table:table-cell>
              <table:table-cell office:value-type="float" office:value="55.12">
                <text:p>55.12</text:p>
              </table:table-cell>
              <table:table-cell office:value-type="float" office:value="92">
                <text:p>92</text:p>
              </table:table-cell>
              <table:table-cell office:value-type="float" office:value="58.34">
                <text:p>58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454cm" style:legend-expansion="high" chart:style-name="ch2"/>
        <chart:plot-area chart:style-name="ch3" table:cell-range-address="'bench-summary'.A1:'bench-summary'.E13" chart:data-source-has-labels="both" svg:x="0.32cm" svg:y="0.18cm" svg:width="12.137cm" svg:height="8.64cm">
          <chart:coordinate-region svg:x="1.682cm" svg:y="0.379cm" svg:width="10.403cm" svg:height="7.794cm"/>
          <chart:axis chart:dimension="x" chart:name="primary-x" chart:style-name="ch4" chartooo:axis-type="auto">
            <chartooo:date-scale/>
            <chart:categories table:cell-range-address="'bench-summary'.A2:'bench-summary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summary'.B2:'bench-summary'.B13" chart:label-cell-address="'bench-summary'.B1:'bench-summary'.B1" chart:class="chart:line">
            <chart:data-point chart:repeated="12"/>
          </chart:series>
          <chart:series chart:style-name="ch7" chart:values-cell-range-address="'bench-summary'.C2:'bench-summary'.C13" chart:label-cell-address="'bench-summary'.C1:'bench-summary'.C1" chart:class="chart:line">
            <chart:data-point chart:repeated="12"/>
          </chart:series>
          <chart:series chart:style-name="ch8" chart:values-cell-range-address="'bench-summary'.D2:'bench-summary'.D13" chart:label-cell-address="'bench-summary'.D1:'bench-summary'.D1" chart:class="chart:line">
            <chart:data-point chart:repeated="12"/>
          </chart:series>
          <chart:series chart:style-name="ch9" chart:values-cell-range-address="'bench-summary'.E2:'bench-summary'.E13" chart:label-cell-address="'bench-summary'.E1:'bench-summary'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bench-summary'.B1:'bench-summary'.B1</svg:desc>
                </draw:g>
              </table:table-cell>
              <table:table-cell office:value-type="string">
                <text:p>intermediate</text:p>
                <draw:g>
                  <svg:desc>'bench-summary'.C1:'bench-summary'.C1</svg:desc>
                </draw:g>
              </table:table-cell>
              <table:table-cell office:value-type="string">
                <text:p>complex</text:p>
                <draw:g>
                  <svg:desc>'bench-summary'.D1:'bench-summary'.D1</svg:desc>
                </draw:g>
              </table:table-cell>
              <table:table-cell office:value-type="string">
                <text:p>adaptative</text:p>
                <draw:g>
                  <svg:desc>'bench-summary'.E1:'bench-summary'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ench-summary'.A2:'bench-summary'.A13</svg:desc>
                </draw:g>
              </table:table-cell>
              <table:table-cell office:value-type="float" office:value="23.7">
                <text:p>23.7</text:p>
                <draw:g>
                  <svg:desc>'bench-summary'.B2:'bench-summary'.B13</svg:desc>
                </draw:g>
              </table:table-cell>
              <table:table-cell office:value-type="float" office:value="22.36">
                <text:p>22.36</text:p>
                <draw:g>
                  <svg:desc>'bench-summary'.C2:'bench-summary'.C13</svg:desc>
                </draw:g>
              </table:table-cell>
              <table:table-cell office:value-type="float" office:value="23.94">
                <text:p>23.94</text:p>
                <draw:g>
                  <svg:desc>'bench-summary'.D2:'bench-summary'.D13</svg:desc>
                </draw:g>
              </table:table-cell>
              <table:table-cell office:value-type="float" office:value="23.88">
                <text:p>23.88</text:p>
                <draw:g>
                  <svg:desc>'bench-summary'.E2:'bench-summary'.E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34.66">
                <text:p>34.66</text:p>
              </table:table-cell>
              <table:table-cell office:value-type="float" office:value="65">
                <text:p>65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62">
                <text:p>42.62</text:p>
              </table:table-cell>
              <table:table-cell office:value-type="float" office:value="42.72">
                <text:p>42.72</text:p>
              </table:table-cell>
              <table:table-cell office:value-type="float" office:value="76">
                <text:p>76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.2">
                <text:p>59.2</text:p>
              </table:table-cell>
              <table:table-cell office:value-type="float" office:value="55.12">
                <text:p>55.12</text:p>
              </table:table-cell>
              <table:table-cell office:value-type="float" office:value="92">
                <text:p>92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9.76">
                <text:p>129.76</text:p>
              </table:table-cell>
              <table:table-cell office:value-type="float" office:value="102.42">
                <text:p>102.42</text:p>
              </table:table-cell>
              <table:table-cell office:value-type="float" office:value="196">
                <text:p>196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18.52">
                <text:p>418.52</text:p>
              </table:table-cell>
              <table:table-cell office:value-type="float" office:value="258.9">
                <text:p>258.9</text:p>
              </table:table-cell>
              <table:table-cell office:value-type="float" office:value="467">
                <text:p>467</text:p>
              </table:table-cell>
              <table:table-cell office:value-type="float" office:value="258.22">
                <text:p>258.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69.02">
                <text:p>1469.02</text:p>
              </table:table-cell>
              <table:table-cell office:value-type="float" office:value="696.92">
                <text:p>696.92</text:p>
              </table:table-cell>
              <table:table-cell office:value-type="float" office:value="1084">
                <text:p>1084</text:p>
              </table:table-cell>
              <table:table-cell office:value-type="float" office:value="701.02">
                <text:p>701.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337.56">
                <text:p>8337.56</text:p>
              </table:table-cell>
              <table:table-cell office:value-type="float" office:value="2785.62">
                <text:p>2785.62</text:p>
              </table:table-cell>
              <table:table-cell office:value-type="float" office:value="3017">
                <text:p>3017</text:p>
              </table:table-cell>
              <table:table-cell office:value-type="float" office:value="2815.6">
                <text:p>2815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243.86">
                <text:p>32243.86</text:p>
              </table:table-cell>
              <table:table-cell office:value-type="float" office:value="7027.66">
                <text:p>7027.66</text:p>
              </table:table-cell>
              <table:table-cell office:value-type="float" office:value="6784">
                <text:p>6784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7144.6">
                <text:p>127144.6</text:p>
              </table:table-cell>
              <table:table-cell office:value-type="float" office:value="19377.94">
                <text:p>19377.94</text:p>
              </table:table-cell>
              <table:table-cell office:value-type="float" office:value="15068">
                <text:p>15068</text:p>
              </table:table-cell>
              <table:table-cell office:value-type="float" office:value="15068">
                <text:p>150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5092.78">
                <text:p>285092.78</text:p>
              </table:table-cell>
              <table:table-cell office:value-type="float" office:value="36226.4">
                <text:p>36226.4</text:p>
              </table:table-cell>
              <table:table-cell office:value-type="float" office:value="25336">
                <text:p>25336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5528.12">
                <text:p>505528.12</text:p>
              </table:table-cell>
              <table:table-cell office:value-type="float" office:value="57330.04">
                <text:p>57330.04</text:p>
              </table:table-cell>
              <table:table-cell office:value-type="float" office:value="33136">
                <text:p>33136</text:p>
              </table:table-cell>
              <table:table-cell office:value-type="float" office:value="33136">
                <text:p>3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