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summary-old-adaptative2" table:style-name="ta1">
        <table:shapes>
          <draw:frame draw:z-index="0" draw:style-name="gr1" draw:text-style-name="P1" svg:width="4.2976in" svg:height="2.1858in" svg:x="7.9248in" svg:y="0.0417in">
            <draw:object draw:notify-on-update-of-ranges="'bench-summary-old-adaptative2'.A8:'bench-summary-old-adaptative2'.A13 'bench-summary-old-adaptative2'.C8:'bench-summary-old-adaptative2'.C13 'bench-summary-old-adaptative2'.D8:'bench-summary-old-adaptative2'.D13 'bench-summary-old-adaptative2'.E8:'bench-summary-old-adaptative2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3303in" svg:height="2.248in" svg:x="3.4969in" svg:y="0.0315in">
            <draw:object draw:notify-on-update-of-ranges="'bench-summary-old-adaptative2'.A1:'bench-summary-old-adaptative2'.A1 'bench-summary-old-adaptative2'.A2:'bench-summary-old-adaptative2'.A5 'bench-summary-old-adaptative2'.B1:'bench-summary-old-adaptative2'.B1 'bench-summary-old-adaptative2'.B2:'bench-summary-old-adaptative2'.B5 'bench-summary-old-adaptative2'.C1:'bench-summary-old-adaptative2'.C1 'bench-summary-old-adaptative2'.C2:'bench-summary-old-adaptative2'.C5 'bench-summary-old-adaptative2'.D1:'bench-summary-old-adaptative2'.D1 'bench-summary-old-adaptative2'.D2:'bench-summary-old-adaptative2'.D5 'bench-summary-old-adaptative2'.E1:'bench-summary-old-adaptative2'.E1 'bench-summary-old-adaptative2'.E2:'bench-summary-old-adaptative2'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394in" svg:y="2.3508in">
            <draw:object draw:notify-on-update-of-ranges="'bench-summary-old-adaptative2'.A1:'bench-summary-old-adaptative2'.A1 'bench-summary-old-adaptative2'.A2:'bench-summary-old-adaptative2'.A13 'bench-summary-old-adaptative2'.B1:'bench-summary-old-adaptative2'.B1 'bench-summary-old-adaptative2'.B2:'bench-summary-old-adaptative2'.B13 'bench-summary-old-adaptative2'.C1:'bench-summary-old-adaptative2'.C1 'bench-summary-old-adaptative2'.C2:'bench-summary-old-adaptative2'.C13 'bench-summary-old-adaptative2'.D1:'bench-summary-old-adaptative2'.D1 'bench-summary-old-adaptative2'.D2:'bench-summary-old-adaptative2'.D13 'bench-summary-old-adaptative2'.E1:'bench-summary-old-adaptative2'.E1 'bench-summary-old-adaptative2'.E2:'bench-summary-old-adaptative2'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dapt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72" calcext:value-type="float">
            <text:p>23.72</text:p>
          </table:table-cell>
          <table:table-cell office:value-type="float" office:value="24.34" calcext:value-type="float">
            <text:p>24.34</text:p>
          </table:table-cell>
          <table:table-cell office:value-type="float" office:value="24.42" calcext:value-type="float">
            <text:p>24.42</text:p>
          </table:table-cell>
          <table:table-cell office:value-type="float" office:value="24.52" calcext:value-type="float">
            <text:p>24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38" calcext:value-type="float">
            <text:p>33.38</text:p>
          </table:table-cell>
          <table:table-cell office:value-type="float" office:value="34.08" calcext:value-type="float">
            <text:p>34.08</text:p>
          </table:table-cell>
          <table:table-cell office:value-type="float" office:value="65" calcext:value-type="float">
            <text:p>65</text:p>
          </table:table-cell>
          <table:table-cell office:value-type="float" office:value="33.14" calcext:value-type="float">
            <text:p>33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74" calcext:value-type="float">
            <text:p>42.74</text:p>
          </table:table-cell>
          <table:table-cell office:value-type="float" office:value="42.84" calcext:value-type="float">
            <text:p>42.84</text:p>
          </table:table-cell>
          <table:table-cell office:value-type="float" office:value="76" calcext:value-type="float">
            <text:p>76</text:p>
          </table:table-cell>
          <table:table-cell office:value-type="float" office:value="60.68" calcext:value-type="float">
            <text:p>60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82" calcext:value-type="float">
            <text:p>59.82</text:p>
          </table:table-cell>
          <table:table-cell office:value-type="float" office:value="56.26" calcext:value-type="float">
            <text:p>56.26</text:p>
          </table:table-cell>
          <table:table-cell office:value-type="float" office:value="92" calcext:value-type="float">
            <text:p>92</text:p>
          </table:table-cell>
          <table:table-cell office:value-type="float" office:value="68.94" calcext:value-type="float">
            <text:p>68.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.24" calcext:value-type="float">
            <text:p>132.24</text:p>
          </table:table-cell>
          <table:table-cell office:value-type="float" office:value="102.68" calcext:value-type="float">
            <text:p>102.68</text:p>
          </table:table-cell>
          <table:table-cell office:value-type="float" office:value="196" calcext:value-type="float">
            <text:p>196</text:p>
          </table:table-cell>
          <table:table-cell office:value-type="float" office:value="149.98" calcext:value-type="float">
            <text:p>149.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3.28" calcext:value-type="float">
            <text:p>423.28</text:p>
          </table:table-cell>
          <table:table-cell office:value-type="float" office:value="258.52" calcext:value-type="float">
            <text:p>258.52</text:p>
          </table:table-cell>
          <table:table-cell office:value-type="float" office:value="467" calcext:value-type="float">
            <text:p>467</text:p>
          </table:table-cell>
          <table:table-cell office:value-type="float" office:value="357.7" calcext:value-type="float">
            <text:p>357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74.5" calcext:value-type="float">
            <text:p>1474.5</text:p>
          </table:table-cell>
          <table:table-cell office:value-type="float" office:value="698.84" calcext:value-type="float">
            <text:p>698.84</text:p>
          </table:table-cell>
          <table:table-cell office:value-type="float" office:value="1084" calcext:value-type="float">
            <text:p>1084</text:p>
          </table:table-cell>
          <table:table-cell office:value-type="float" office:value="886.16" calcext:value-type="float">
            <text:p>886.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352.66" calcext:value-type="float">
            <text:p>8352.66</text:p>
          </table:table-cell>
          <table:table-cell office:value-type="float" office:value="2788.1" calcext:value-type="float">
            <text:p>2788.1</text:p>
          </table:table-cell>
          <table:table-cell office:value-type="float" office:value="3017" calcext:value-type="float">
            <text:p>3017</text:p>
          </table:table-cell>
          <table:table-cell office:value-type="float" office:value="2882.3" calcext:value-type="float">
            <text:p>2882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291.78" calcext:value-type="float">
            <text:p>32291.78</text:p>
          </table:table-cell>
          <table:table-cell office:value-type="float" office:value="7031.6" calcext:value-type="float">
            <text:p>7031.6</text:p>
          </table:table-cell>
          <table:table-cell table:number-columns-repeated="2"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7152.58" calcext:value-type="float">
            <text:p>127152.58</text:p>
          </table:table-cell>
          <table:table-cell office:value-type="float" office:value="19308.6" calcext:value-type="float">
            <text:p>19308.6</text:p>
          </table:table-cell>
          <table:table-cell table:number-columns-repeated="2" office:value-type="float" office:value="15068" calcext:value-type="float">
            <text:p>150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85381.5" calcext:value-type="float">
            <text:p>285381.5</text:p>
          </table:table-cell>
          <table:table-cell office:value-type="float" office:value="36192.36" calcext:value-type="float">
            <text:p>36192.36</text:p>
          </table:table-cell>
          <table:table-cell table:number-columns-repeated="2" office:value-type="float" office:value="25336" calcext:value-type="float">
            <text:p>253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4585.36" calcext:value-type="float">
            <text:p>504585.36</text:p>
          </table:table-cell>
          <table:table-cell office:value-type="float" office:value="57325.26" calcext:value-type="float">
            <text:p>57325.26</text:p>
          </table:table-cell>
          <table:table-cell table:number-columns-repeated="2" office:value-type="float" office:value="33136" calcext:value-type="float">
            <text:p>3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8T16:17:54.755558685</dc:date>
    <meta:editing-duration>PT3M36S</meta:editing-duration>
    <meta:editing-cycles>1</meta:editing-cycles>
    <meta:generator>LibreOffice/7.3.7.2$Linux_X86_64 LibreOffice_project/30$Build-2</meta:generator>
    <meta:document-statistic meta:table-count="1" meta:cell-count="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17cm" svg:height="5.553cm" xlink:href=".." xlink:type="simple" chart:class="chart:line" chart:style-name="ch1">
        <chart:legend chart:legend-position="end" svg:x="8.065cm" svg:y="1.979cm" style:legend-expansion="high" chart:style-name="ch2"/>
        <chart:plot-area chart:style-name="ch3" table:cell-range-address="'bench-summary-old-adaptative2'.A8:'bench-summary-old-adaptative2'.A13 'bench-summary-old-adaptative2'.C8:'bench-summary-old-adaptative2'.E13" chart:data-source-has-labels="column" svg:x="0.218cm" svg:y="0.111cm" svg:width="7.629cm" svg:height="5.331cm">
          <chart:coordinate-region svg:x="1.395cm" svg:y="0.31cm" svg:width="6.08cm" svg:height="4.485cm"/>
          <chart:axis chart:dimension="x" chart:name="primary-x" chart:style-name="ch4" chartooo:axis-type="auto">
            <chartooo:date-scale/>
            <chart:categories table:cell-range-address="'bench-summary-old-adaptative2'.A8:'bench-summary-old-adaptative2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-old-adaptative2'.C8:'bench-summary-old-adaptative2'.C13" chart:class="chart:line">
            <chart:data-point chart:repeated="6"/>
          </chart:series>
          <chart:series chart:style-name="ch7" chart:values-cell-range-address="'bench-summary-old-adaptative2'.D8:'bench-summary-old-adaptative2'.D13" chart:class="chart:line">
            <chart:data-point chart:repeated="6"/>
          </chart:series>
          <chart:series chart:style-name="ch8" chart:values-cell-range-address="'bench-summary-old-adaptative2'.E8:'bench-summary-old-adaptative2'.E1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bench-summary-old-adaptative2'.A8:'bench-summary-old-adaptative2'.A13</svg:desc>
                </draw:g>
              </table:table-cell>
              <table:table-cell office:value-type="float" office:value="698.84">
                <text:p>698.84</text:p>
                <draw:g>
                  <svg:desc>'bench-summary-old-adaptative2'.C8:'bench-summary-old-adaptative2'.C13</svg:desc>
                </draw:g>
              </table:table-cell>
              <table:table-cell office:value-type="float" office:value="1084">
                <text:p>1084</text:p>
                <draw:g>
                  <svg:desc>'bench-summary-old-adaptative2'.D8:'bench-summary-old-adaptative2'.D13</svg:desc>
                </draw:g>
              </table:table-cell>
              <table:table-cell office:value-type="float" office:value="886.16">
                <text:p>886.16</text:p>
                <draw:g>
                  <svg:desc>'bench-summary-old-adaptative2'.E8:'bench-summary-old-adaptative2'.E13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88.1">
                <text:p>2788.1</text:p>
              </table:table-cell>
              <table:table-cell office:value-type="float" office:value="3017">
                <text:p>3017</text:p>
              </table:table-cell>
              <table:table-cell office:value-type="float" office:value="2882.3">
                <text:p>2882.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31.6">
                <text:p>7031.6</text:p>
              </table:table-cell>
              <table:table-cell office:value-type="float" office:value="6784">
                <text:p>6784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308.6">
                <text:p>19308.6</text:p>
              </table:table-cell>
              <table:table-cell office:value-type="float" office:value="15068">
                <text:p>15068</text:p>
              </table:table-cell>
              <table:table-cell office:value-type="float" office:value="15068">
                <text:p>1506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6192.36">
                <text:p>36192.36</text:p>
              </table:table-cell>
              <table:table-cell office:value-type="float" office:value="25336">
                <text:p>25336</text:p>
              </table:table-cell>
              <table:table-cell office:value-type="float" office:value="25336">
                <text:p>253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325.26">
                <text:p>57325.26</text:p>
              </table:table-cell>
              <table:table-cell office:value-type="float" office:value="33136">
                <text:p>33136</text:p>
              </table:table-cell>
              <table:table-cell office:value-type="float" office:value="33136">
                <text:p>33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cm" svg:height="5.711cm" xlink:href=".." xlink:type="simple" chart:class="chart:line" chart:style-name="ch1">
        <chart:legend chart:legend-position="end" svg:x="7.777cm" svg:y="1.809cm" style:legend-expansion="high" chart:style-name="ch2"/>
        <chart:plot-area chart:style-name="ch3" table:cell-range-address="'bench-summary-old-adaptative2'.A1:'bench-summary-old-adaptative2'.E5" chart:data-source-has-labels="both" svg:x="0.22cm" svg:y="0.114cm" svg:width="7.337cm" svg:height="5.483cm">
          <chart:coordinate-region svg:x="1.027cm" svg:y="0.313cm" svg:width="6.343cm" svg:height="4.637cm"/>
          <chart:axis chart:dimension="x" chart:name="primary-x" chart:style-name="ch4" chartooo:axis-type="auto">
            <chartooo:date-scale/>
            <chart:categories table:cell-range-address="'bench-summary-old-adaptative2'.A2:'bench-summary-old-adaptative2'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-old-adaptative2'.B2:'bench-summary-old-adaptative2'.B5" chart:label-cell-address="'bench-summary-old-adaptative2'.B1:'bench-summary-old-adaptative2'.B1" chart:class="chart:line">
            <chart:data-point chart:repeated="4"/>
          </chart:series>
          <chart:series chart:style-name="ch7" chart:values-cell-range-address="'bench-summary-old-adaptative2'.C2:'bench-summary-old-adaptative2'.C5" chart:label-cell-address="'bench-summary-old-adaptative2'.C1:'bench-summary-old-adaptative2'.C1" chart:class="chart:line">
            <chart:data-point chart:repeated="4"/>
          </chart:series>
          <chart:series chart:style-name="ch8" chart:values-cell-range-address="'bench-summary-old-adaptative2'.D2:'bench-summary-old-adaptative2'.D5" chart:label-cell-address="'bench-summary-old-adaptative2'.D1:'bench-summary-old-adaptative2'.D1" chart:class="chart:line">
            <chart:data-point chart:repeated="4"/>
          </chart:series>
          <chart:series chart:style-name="ch9" chart:values-cell-range-address="'bench-summary-old-adaptative2'.E2:'bench-summary-old-adaptative2'.E5" chart:label-cell-address="'bench-summary-old-adaptative2'.E1:'bench-summary-old-adaptative2'.E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bench-summary-old-adaptative2'.B1:'bench-summary-old-adaptative2'.B1</svg:desc>
                </draw:g>
              </table:table-cell>
              <table:table-cell office:value-type="string">
                <text:p>intermediate</text:p>
                <draw:g>
                  <svg:desc>'bench-summary-old-adaptative2'.C1:'bench-summary-old-adaptative2'.C1</svg:desc>
                </draw:g>
              </table:table-cell>
              <table:table-cell office:value-type="string">
                <text:p>complex</text:p>
                <draw:g>
                  <svg:desc>'bench-summary-old-adaptative2'.D1:'bench-summary-old-adaptative2'.D1</svg:desc>
                </draw:g>
              </table:table-cell>
              <table:table-cell office:value-type="string">
                <text:p>adaptative</text:p>
                <draw:g>
                  <svg:desc>'bench-summary-old-adaptative2'.E1:'bench-summary-old-adaptative2'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ench-summary-old-adaptative2'.A2:'bench-summary-old-adaptative2'.A5</svg:desc>
                </draw:g>
              </table:table-cell>
              <table:table-cell office:value-type="float" office:value="23.72">
                <text:p>23.72</text:p>
                <draw:g>
                  <svg:desc>'bench-summary-old-adaptative2'.B2:'bench-summary-old-adaptative2'.B5</svg:desc>
                </draw:g>
              </table:table-cell>
              <table:table-cell office:value-type="float" office:value="24.34">
                <text:p>24.34</text:p>
                <draw:g>
                  <svg:desc>'bench-summary-old-adaptative2'.C2:'bench-summary-old-adaptative2'.C5</svg:desc>
                </draw:g>
              </table:table-cell>
              <table:table-cell office:value-type="float" office:value="24.42">
                <text:p>24.42</text:p>
                <draw:g>
                  <svg:desc>'bench-summary-old-adaptative2'.D2:'bench-summary-old-adaptative2'.D5</svg:desc>
                </draw:g>
              </table:table-cell>
              <table:table-cell office:value-type="float" office:value="24.52">
                <text:p>24.52</text:p>
                <draw:g>
                  <svg:desc>'bench-summary-old-adaptative2'.E2:'bench-summary-old-adaptative2'.E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38">
                <text:p>33.38</text:p>
              </table:table-cell>
              <table:table-cell office:value-type="float" office:value="34.08">
                <text:p>34.08</text:p>
              </table:table-cell>
              <table:table-cell office:value-type="float" office:value="65">
                <text:p>65</text:p>
              </table:table-cell>
              <table:table-cell office:value-type="float" office:value="33.14">
                <text:p>33.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.74">
                <text:p>42.74</text:p>
              </table:table-cell>
              <table:table-cell office:value-type="float" office:value="42.84">
                <text:p>42.84</text:p>
              </table:table-cell>
              <table:table-cell office:value-type="float" office:value="76">
                <text:p>76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9.82">
                <text:p>59.82</text:p>
              </table:table-cell>
              <table:table-cell office:value-type="float" office:value="56.26">
                <text:p>56.26</text:p>
              </table:table-cell>
              <table:table-cell office:value-type="float" office:value="92">
                <text:p>92</text:p>
              </table:table-cell>
              <table:table-cell office:value-type="float" office:value="68.94">
                <text:p>68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454cm" style:legend-expansion="high" chart:style-name="ch2"/>
        <chart:plot-area chart:style-name="ch3" table:cell-range-address="'bench-summary-old-adaptative2'.A1:'bench-summary-old-adaptative2'.E13" chart:data-source-has-labels="both" svg:x="0.32cm" svg:y="0.18cm" svg:width="12.137cm" svg:height="8.64cm">
          <chart:coordinate-region svg:x="1.682cm" svg:y="0.379cm" svg:width="10.403cm" svg:height="7.794cm"/>
          <chart:axis chart:dimension="x" chart:name="primary-x" chart:style-name="ch4" chartooo:axis-type="auto">
            <chartooo:date-scale/>
            <chart:categories table:cell-range-address="'bench-summary-old-adaptative2'.A2:'bench-summary-old-adaptative2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-old-adaptative2'.B2:'bench-summary-old-adaptative2'.B13" chart:label-cell-address="'bench-summary-old-adaptative2'.B1:'bench-summary-old-adaptative2'.B1" chart:class="chart:line">
            <chart:data-point chart:repeated="12"/>
          </chart:series>
          <chart:series chart:style-name="ch7" chart:values-cell-range-address="'bench-summary-old-adaptative2'.C2:'bench-summary-old-adaptative2'.C13" chart:label-cell-address="'bench-summary-old-adaptative2'.C1:'bench-summary-old-adaptative2'.C1" chart:class="chart:line">
            <chart:data-point chart:repeated="12"/>
          </chart:series>
          <chart:series chart:style-name="ch8" chart:values-cell-range-address="'bench-summary-old-adaptative2'.D2:'bench-summary-old-adaptative2'.D13" chart:label-cell-address="'bench-summary-old-adaptative2'.D1:'bench-summary-old-adaptative2'.D1" chart:class="chart:line">
            <chart:data-point chart:repeated="12"/>
          </chart:series>
          <chart:series chart:style-name="ch9" chart:values-cell-range-address="'bench-summary-old-adaptative2'.E2:'bench-summary-old-adaptative2'.E13" chart:label-cell-address="'bench-summary-old-adaptative2'.E1:'bench-summary-old-adaptative2'.E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bench-summary-old-adaptative2'.B1:'bench-summary-old-adaptative2'.B1</svg:desc>
                </draw:g>
              </table:table-cell>
              <table:table-cell office:value-type="string">
                <text:p>intermediate</text:p>
                <draw:g>
                  <svg:desc>'bench-summary-old-adaptative2'.C1:'bench-summary-old-adaptative2'.C1</svg:desc>
                </draw:g>
              </table:table-cell>
              <table:table-cell office:value-type="string">
                <text:p>complex</text:p>
                <draw:g>
                  <svg:desc>'bench-summary-old-adaptative2'.D1:'bench-summary-old-adaptative2'.D1</svg:desc>
                </draw:g>
              </table:table-cell>
              <table:table-cell office:value-type="string">
                <text:p>adaptative</text:p>
                <draw:g>
                  <svg:desc>'bench-summary-old-adaptative2'.E1:'bench-summary-old-adaptative2'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ench-summary-old-adaptative2'.A2:'bench-summary-old-adaptative2'.A13</svg:desc>
                </draw:g>
              </table:table-cell>
              <table:table-cell office:value-type="float" office:value="23.72">
                <text:p>23.72</text:p>
                <draw:g>
                  <svg:desc>'bench-summary-old-adaptative2'.B2:'bench-summary-old-adaptative2'.B13</svg:desc>
                </draw:g>
              </table:table-cell>
              <table:table-cell office:value-type="float" office:value="24.34">
                <text:p>24.34</text:p>
                <draw:g>
                  <svg:desc>'bench-summary-old-adaptative2'.C2:'bench-summary-old-adaptative2'.C13</svg:desc>
                </draw:g>
              </table:table-cell>
              <table:table-cell office:value-type="float" office:value="24.42">
                <text:p>24.42</text:p>
                <draw:g>
                  <svg:desc>'bench-summary-old-adaptative2'.D2:'bench-summary-old-adaptative2'.D13</svg:desc>
                </draw:g>
              </table:table-cell>
              <table:table-cell office:value-type="float" office:value="24.52">
                <text:p>24.52</text:p>
                <draw:g>
                  <svg:desc>'bench-summary-old-adaptative2'.E2:'bench-summary-old-adaptative2'.E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38">
                <text:p>33.38</text:p>
              </table:table-cell>
              <table:table-cell office:value-type="float" office:value="34.08">
                <text:p>34.08</text:p>
              </table:table-cell>
              <table:table-cell office:value-type="float" office:value="65">
                <text:p>65</text:p>
              </table:table-cell>
              <table:table-cell office:value-type="float" office:value="33.14">
                <text:p>33.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.74">
                <text:p>42.74</text:p>
              </table:table-cell>
              <table:table-cell office:value-type="float" office:value="42.84">
                <text:p>42.84</text:p>
              </table:table-cell>
              <table:table-cell office:value-type="float" office:value="76">
                <text:p>76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9.82">
                <text:p>59.82</text:p>
              </table:table-cell>
              <table:table-cell office:value-type="float" office:value="56.26">
                <text:p>56.26</text:p>
              </table:table-cell>
              <table:table-cell office:value-type="float" office:value="92">
                <text:p>92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2.24">
                <text:p>132.24</text:p>
              </table:table-cell>
              <table:table-cell office:value-type="float" office:value="102.68">
                <text:p>102.68</text:p>
              </table:table-cell>
              <table:table-cell office:value-type="float" office:value="196">
                <text:p>196</text:p>
              </table:table-cell>
              <table:table-cell office:value-type="float" office:value="149.98">
                <text:p>149.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3.28">
                <text:p>423.28</text:p>
              </table:table-cell>
              <table:table-cell office:value-type="float" office:value="258.52">
                <text:p>258.52</text:p>
              </table:table-cell>
              <table:table-cell office:value-type="float" office:value="467">
                <text:p>467</text:p>
              </table:table-cell>
              <table:table-cell office:value-type="float" office:value="357.7">
                <text:p>357.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74.5">
                <text:p>1474.5</text:p>
              </table:table-cell>
              <table:table-cell office:value-type="float" office:value="698.84">
                <text:p>698.84</text:p>
              </table:table-cell>
              <table:table-cell office:value-type="float" office:value="1084">
                <text:p>1084</text:p>
              </table:table-cell>
              <table:table-cell office:value-type="float" office:value="886.16">
                <text:p>886.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352.66">
                <text:p>8352.66</text:p>
              </table:table-cell>
              <table:table-cell office:value-type="float" office:value="2788.1">
                <text:p>2788.1</text:p>
              </table:table-cell>
              <table:table-cell office:value-type="float" office:value="3017">
                <text:p>3017</text:p>
              </table:table-cell>
              <table:table-cell office:value-type="float" office:value="2882.3">
                <text:p>2882.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291.78">
                <text:p>32291.78</text:p>
              </table:table-cell>
              <table:table-cell office:value-type="float" office:value="7031.6">
                <text:p>7031.6</text:p>
              </table:table-cell>
              <table:table-cell office:value-type="float" office:value="6784">
                <text:p>6784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7152.58">
                <text:p>127152.58</text:p>
              </table:table-cell>
              <table:table-cell office:value-type="float" office:value="19308.6">
                <text:p>19308.6</text:p>
              </table:table-cell>
              <table:table-cell office:value-type="float" office:value="15068">
                <text:p>15068</text:p>
              </table:table-cell>
              <table:table-cell office:value-type="float" office:value="15068">
                <text:p>1506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5381.5">
                <text:p>285381.5</text:p>
              </table:table-cell>
              <table:table-cell office:value-type="float" office:value="36192.36">
                <text:p>36192.36</text:p>
              </table:table-cell>
              <table:table-cell office:value-type="float" office:value="25336">
                <text:p>25336</text:p>
              </table:table-cell>
              <table:table-cell office:value-type="float" office:value="25336">
                <text:p>253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04585.36">
                <text:p>504585.36</text:p>
              </table:table-cell>
              <table:table-cell office:value-type="float" office:value="57325.26">
                <text:p>57325.26</text:p>
              </table:table-cell>
              <table:table-cell office:value-type="float" office:value="33136">
                <text:p>33136</text:p>
              </table:table-cell>
              <table:table-cell office:value-type="float" office:value="33136">
                <text:p>33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