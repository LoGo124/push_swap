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summary-old-adaptative" table:style-name="ta1">
        <table:shapes>
          <draw:frame draw:z-index="0" draw:style-name="gr1" draw:text-style-name="P1" svg:width="4.3091in" svg:height="1.6835in" svg:x="3.5075in" svg:y="0.0524in">
            <draw:object draw:notify-on-update-of-ranges="'bench-summary-old-adaptative'.A1:'bench-summary-old-adaptative'.A1 'bench-summary-old-adaptative'.A2:'bench-summary-old-adaptative'.A4 'bench-summary-old-adaptative'.B1:'bench-summary-old-adaptative'.B1 'bench-summary-old-adaptative'.B2:'bench-summary-old-adaptative'.B4 'bench-summary-old-adaptative'.C1:'bench-summary-old-adaptative'.C1 'bench-summary-old-adaptative'.C2:'bench-summary-old-adaptative'.C4 'bench-summary-old-adaptative'.D1:'bench-summary-old-adaptative'.D1 'bench-summary-old-adaptative'.D2:'bench-summary-old-adaptative'.D4 'bench-summary-old-adaptative'.E1:'bench-summary-old-adaptative'.E1 'bench-summary-old-adaptative'.E2:'bench-summary-old-adaptative'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322in" svg:height="1.6791in" svg:x="7.9299in" svg:y="0.0394in">
            <draw:object draw:notify-on-update-of-ranges="'bench-summary-old-adaptative'.A8:'bench-summary-old-adaptative'.A10 'bench-summary-old-adaptative'.C8:'bench-summary-old-adaptative'.C10 'bench-summary-old-adaptative'.D8:'bench-summary-old-adaptative'.D10 'bench-summary-old-adaptative'.E8:'bench-summary-old-adaptative'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394in" svg:y="1.8177in">
            <draw:object draw:notify-on-update-of-ranges="'bench-summary-old-adaptative'.A1:'bench-summary-old-adaptative'.A1 'bench-summary-old-adaptative'.A2:'bench-summary-old-adaptative'.A10 'bench-summary-old-adaptative'.B1:'bench-summary-old-adaptative'.B1 'bench-summary-old-adaptative'.B2:'bench-summary-old-adaptative'.B10 'bench-summary-old-adaptative'.C1:'bench-summary-old-adaptative'.C1 'bench-summary-old-adaptative'.C2:'bench-summary-old-adaptative'.C10 'bench-summary-old-adaptative'.D1:'bench-summary-old-adaptative'.D1 'bench-summary-old-adaptative'.D2:'bench-summary-old-adaptative'.D10 'bench-summary-old-adaptative'.E1:'bench-summary-old-adaptative'.E1 'bench-summary-old-adaptative'.E2:'bench-summary-old-adaptative'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daptat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6" calcext:value-type="float">
            <text:p>8.06</text:p>
          </table:table-cell>
          <table:table-cell office:value-type="float" office:value="8.76" calcext:value-type="float">
            <text:p>8.76</text:p>
          </table:table-cell>
          <table:table-cell office:value-type="float" office:value="9.16" calcext:value-type="float">
            <text:p>9.16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8" calcext:value-type="float">
            <text:p>32.8</text:p>
          </table:table-cell>
          <table:table-cell office:value-type="float" office:value="34.38" calcext:value-type="float">
            <text:p>34.38</text:p>
          </table:table-cell>
          <table:table-cell office:value-type="float" office:value="65" calcext:value-type="float">
            <text:p>65</text:p>
          </table:table-cell>
          <table:table-cell office:value-type="float" office:value="33.42" calcext:value-type="float">
            <text:p>33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.58" calcext:value-type="float">
            <text:p>58.58</text:p>
          </table:table-cell>
          <table:table-cell office:value-type="float" office:value="55.6" calcext:value-type="float">
            <text:p>55.6</text:p>
          </table:table-cell>
          <table:table-cell office:value-type="float" office:value="92" calcext:value-type="float">
            <text:p>92</text:p>
          </table:table-cell>
          <table:table-cell office:value-type="float" office:value="55.32" calcext:value-type="float">
            <text:p>55.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.48" calcext:value-type="float">
            <text:p>130.48</text:p>
          </table:table-cell>
          <table:table-cell office:value-type="float" office:value="101.88" calcext:value-type="float">
            <text:p>101.88</text:p>
          </table:table-cell>
          <table:table-cell office:value-type="float" office:value="196" calcext:value-type="float">
            <text:p>1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3.28" calcext:value-type="float">
            <text:p>423.28</text:p>
          </table:table-cell>
          <table:table-cell office:value-type="float" office:value="260.46" calcext:value-type="float">
            <text:p>260.46</text:p>
          </table:table-cell>
          <table:table-cell office:value-type="float" office:value="467" calcext:value-type="float">
            <text:p>467</text:p>
          </table:table-cell>
          <table:table-cell office:value-type="float" office:value="261.88" calcext:value-type="float">
            <text:p>261.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9.42" calcext:value-type="float">
            <text:p>1459.42</text:p>
          </table:table-cell>
          <table:table-cell office:value-type="float" office:value="695.87" calcext:value-type="float">
            <text:p>695.87</text:p>
          </table:table-cell>
          <table:table-cell office:value-type="float" office:value="1084" calcext:value-type="float">
            <text:p>1084</text:p>
          </table:table-cell>
          <table:table-cell office:value-type="float" office:value="687.33" calcext:value-type="float">
            <text:p>687.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319.54" calcext:value-type="float">
            <text:p>8319.54</text:p>
          </table:table-cell>
          <table:table-cell office:value-type="float" office:value="2815.98" calcext:value-type="float">
            <text:p>2815.98</text:p>
          </table:table-cell>
          <table:table-cell office:value-type="float" office:value="3017" calcext:value-type="float">
            <text:p>3017</text:p>
          </table:table-cell>
          <table:table-cell office:value-type="float" office:value="2813.91" calcext:value-type="float">
            <text:p>2813.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407.27" calcext:value-type="float">
            <text:p>32407.27</text:p>
          </table:table-cell>
          <table:table-cell office:value-type="float" office:value="7038.61" calcext:value-type="float">
            <text:p>7038.61</text:p>
          </table:table-cell>
          <table:table-cell office:value-type="float" office:value="6784" calcext:value-type="float">
            <text:p>6784</text:p>
          </table:table-cell>
          <table:table-cell office:value-type="float" office:value="6879.11" calcext:value-type="float">
            <text:p>6879.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6667.39" calcext:value-type="float">
            <text:p>126667.39</text:p>
          </table:table-cell>
          <table:table-cell office:value-type="float" office:value="19368.61" calcext:value-type="float">
            <text:p>19368.61</text:p>
          </table:table-cell>
          <table:table-cell office:value-type="float" office:value="15068" calcext:value-type="float">
            <text:p>15068</text:p>
          </table:table-cell>
          <table:table-cell office:value-type="float" office:value="17228.32" calcext:value-type="float">
            <text:p>17228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28T16:16:26.984061094</dc:date>
    <meta:editing-duration>PT2M8S</meta:editing-duration>
    <meta:editing-cycles>1</meta:editing-cycles>
    <meta:generator>LibreOffice/7.3.7.2$Linux_X86_64 LibreOffice_project/30$Build-2</meta:generator>
    <meta:document-statistic meta:table-count="1" meta:cell-count="5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46cm" svg:height="4.277cm" xlink:href=".." xlink:type="simple" chart:class="chart:line" chart:style-name="ch1">
        <chart:legend chart:legend-position="end" svg:x="7.723cm" svg:y="1.092cm" style:legend-expansion="high" chart:style-name="ch2"/>
        <chart:plot-area chart:style-name="ch3" table:cell-range-address="'bench-summary-old-adaptative'.A1:'bench-summary-old-adaptative'.E4" chart:data-source-has-labels="both" svg:x="0.218cm" svg:y="0.085cm" svg:width="7.287cm" svg:height="4.107cm">
          <chart:coordinate-region svg:x="1.025cm" svg:y="0.284cm" svg:width="6.293cm" svg:height="3.261cm"/>
          <chart:axis chart:dimension="x" chart:name="primary-x" chart:style-name="ch4" chartooo:axis-type="auto">
            <chartooo:date-scale/>
            <chart:categories table:cell-range-address="'bench-summary-old-adaptative'.A2:'bench-summary-old-adaptative'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summary-old-adaptative'.B2:'bench-summary-old-adaptative'.B4" chart:label-cell-address="'bench-summary-old-adaptative'.B1:'bench-summary-old-adaptative'.B1" chart:class="chart:line">
            <chart:data-point chart:repeated="3"/>
          </chart:series>
          <chart:series chart:style-name="ch7" chart:values-cell-range-address="'bench-summary-old-adaptative'.C2:'bench-summary-old-adaptative'.C4" chart:label-cell-address="'bench-summary-old-adaptative'.C1:'bench-summary-old-adaptative'.C1" chart:class="chart:line">
            <chart:data-point chart:repeated="3"/>
          </chart:series>
          <chart:series chart:style-name="ch8" chart:values-cell-range-address="'bench-summary-old-adaptative'.D2:'bench-summary-old-adaptative'.D4" chart:label-cell-address="'bench-summary-old-adaptative'.D1:'bench-summary-old-adaptative'.D1" chart:class="chart:line">
            <chart:data-point chart:repeated="3"/>
          </chart:series>
          <chart:series chart:style-name="ch9" chart:values-cell-range-address="'bench-summary-old-adaptative'.E2:'bench-summary-old-adaptative'.E4" chart:label-cell-address="'bench-summary-old-adaptative'.E1:'bench-summary-old-adaptative'.E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bench-summary-old-adaptative'.B1:'bench-summary-old-adaptative'.B1</svg:desc>
                </draw:g>
              </table:table-cell>
              <table:table-cell office:value-type="string">
                <text:p>intermediate</text:p>
                <draw:g>
                  <svg:desc>'bench-summary-old-adaptative'.C1:'bench-summary-old-adaptative'.C1</svg:desc>
                </draw:g>
              </table:table-cell>
              <table:table-cell office:value-type="string">
                <text:p>complex</text:p>
                <draw:g>
                  <svg:desc>'bench-summary-old-adaptative'.D1:'bench-summary-old-adaptative'.D1</svg:desc>
                </draw:g>
              </table:table-cell>
              <table:table-cell office:value-type="string">
                <text:p>adaptative</text:p>
                <draw:g>
                  <svg:desc>'bench-summary-old-adaptative'.E1:'bench-summary-old-adaptative'.E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bench-summary-old-adaptative'.A2:'bench-summary-old-adaptative'.A4</svg:desc>
                </draw:g>
              </table:table-cell>
              <table:table-cell office:value-type="float" office:value="8.06">
                <text:p>8.06</text:p>
                <draw:g>
                  <svg:desc>'bench-summary-old-adaptative'.B2:'bench-summary-old-adaptative'.B4</svg:desc>
                </draw:g>
              </table:table-cell>
              <table:table-cell office:value-type="float" office:value="8.76">
                <text:p>8.76</text:p>
                <draw:g>
                  <svg:desc>'bench-summary-old-adaptative'.C2:'bench-summary-old-adaptative'.C4</svg:desc>
                </draw:g>
              </table:table-cell>
              <table:table-cell office:value-type="float" office:value="9.16">
                <text:p>9.16</text:p>
                <draw:g>
                  <svg:desc>'bench-summary-old-adaptative'.D2:'bench-summary-old-adaptative'.D4</svg:desc>
                </draw:g>
              </table:table-cell>
              <table:table-cell office:value-type="float" office:value="8.86">
                <text:p>8.86</text:p>
                <draw:g>
                  <svg:desc>'bench-summary-old-adaptative'.E2:'bench-summary-old-adaptative'.E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.8">
                <text:p>32.8</text:p>
              </table:table-cell>
              <table:table-cell office:value-type="float" office:value="34.38">
                <text:p>34.38</text:p>
              </table:table-cell>
              <table:table-cell office:value-type="float" office:value="65">
                <text:p>65</text:p>
              </table:table-cell>
              <table:table-cell office:value-type="float" office:value="33.42">
                <text:p>33.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8.58">
                <text:p>58.58</text:p>
              </table:table-cell>
              <table:table-cell office:value-type="float" office:value="55.6">
                <text:p>55.6</text:p>
              </table:table-cell>
              <table:table-cell office:value-type="float" office:value="92">
                <text:p>92</text:p>
              </table:table-cell>
              <table:table-cell office:value-type="float" office:value="55.32">
                <text:p>5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79cm" svg:height="4.266cm" xlink:href=".." xlink:type="simple" chart:class="chart:line" chart:style-name="ch1">
        <chart:legend chart:legend-position="end" svg:x="8.127cm" svg:y="1.336cm" style:legend-expansion="high" chart:style-name="ch2"/>
        <chart:plot-area chart:style-name="ch3" table:cell-range-address="'bench-summary-old-adaptative'.A8:'bench-summary-old-adaptative'.A10 'bench-summary-old-adaptative'.C8:'bench-summary-old-adaptative'.E10" chart:data-source-has-labels="column" svg:x="0.219cm" svg:y="0.085cm" svg:width="7.689cm" svg:height="4.096cm">
          <chart:coordinate-region svg:x="1.396cm" svg:y="0.284cm" svg:width="6.14cm" svg:height="3.25cm"/>
          <chart:axis chart:dimension="x" chart:name="primary-x" chart:style-name="ch4" chartooo:axis-type="auto">
            <chartooo:date-scale/>
            <chart:categories table:cell-range-address="'bench-summary-old-adaptative'.A8:'bench-summary-old-adaptative'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summary-old-adaptative'.C8:'bench-summary-old-adaptative'.C10" chart:class="chart:line">
            <chart:data-point chart:repeated="3"/>
          </chart:series>
          <chart:series chart:style-name="ch7" chart:values-cell-range-address="'bench-summary-old-adaptative'.D8:'bench-summary-old-adaptative'.D10" chart:class="chart:line">
            <chart:data-point chart:repeated="3"/>
          </chart:series>
          <chart:series chart:style-name="ch8" chart:values-cell-range-address="'bench-summary-old-adaptative'.E8:'bench-summary-old-adaptative'.E1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bench-summary-old-adaptative'.A8:'bench-summary-old-adaptative'.A10</svg:desc>
                </draw:g>
              </table:table-cell>
              <table:table-cell office:value-type="float" office:value="2815.98">
                <text:p>2815.98</text:p>
                <draw:g>
                  <svg:desc>'bench-summary-old-adaptative'.C8:'bench-summary-old-adaptative'.C10</svg:desc>
                </draw:g>
              </table:table-cell>
              <table:table-cell office:value-type="float" office:value="3017">
                <text:p>3017</text:p>
                <draw:g>
                  <svg:desc>'bench-summary-old-adaptative'.D8:'bench-summary-old-adaptative'.D10</svg:desc>
                </draw:g>
              </table:table-cell>
              <table:table-cell office:value-type="float" office:value="2813.91">
                <text:p>2813.91</text:p>
                <draw:g>
                  <svg:desc>'bench-summary-old-adaptative'.E8:'bench-summary-old-adaptative'.E10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38.61">
                <text:p>7038.61</text:p>
              </table:table-cell>
              <table:table-cell office:value-type="float" office:value="6784">
                <text:p>6784</text:p>
              </table:table-cell>
              <table:table-cell office:value-type="float" office:value="6879.11">
                <text:p>6879.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368.61">
                <text:p>19368.61</text:p>
              </table:table-cell>
              <table:table-cell office:value-type="float" office:value="15068">
                <text:p>15068</text:p>
              </table:table-cell>
              <table:table-cell office:value-type="float" office:value="17228.32">
                <text:p>17228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454cm" style:legend-expansion="high" chart:style-name="ch2"/>
        <chart:plot-area chart:style-name="ch3" table:cell-range-address="'bench-summary-old-adaptative'.A1:'bench-summary-old-adaptative'.E10" chart:data-source-has-labels="both" svg:x="0.32cm" svg:y="0.18cm" svg:width="12.137cm" svg:height="8.64cm">
          <chart:coordinate-region svg:x="1.682cm" svg:y="0.379cm" svg:width="10.403cm" svg:height="7.794cm"/>
          <chart:axis chart:dimension="x" chart:name="primary-x" chart:style-name="ch4" chartooo:axis-type="auto">
            <chartooo:date-scale/>
            <chart:categories table:cell-range-address="'bench-summary-old-adaptative'.A2:'bench-summary-old-adaptative'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summary-old-adaptative'.B2:'bench-summary-old-adaptative'.B10" chart:label-cell-address="'bench-summary-old-adaptative'.B1:'bench-summary-old-adaptative'.B1" chart:class="chart:line">
            <chart:data-point chart:repeated="9"/>
          </chart:series>
          <chart:series chart:style-name="ch7" chart:values-cell-range-address="'bench-summary-old-adaptative'.C2:'bench-summary-old-adaptative'.C10" chart:label-cell-address="'bench-summary-old-adaptative'.C1:'bench-summary-old-adaptative'.C1" chart:class="chart:line">
            <chart:data-point chart:repeated="9"/>
          </chart:series>
          <chart:series chart:style-name="ch8" chart:values-cell-range-address="'bench-summary-old-adaptative'.D2:'bench-summary-old-adaptative'.D10" chart:label-cell-address="'bench-summary-old-adaptative'.D1:'bench-summary-old-adaptative'.D1" chart:class="chart:line">
            <chart:data-point chart:repeated="9"/>
          </chart:series>
          <chart:series chart:style-name="ch9" chart:values-cell-range-address="'bench-summary-old-adaptative'.E2:'bench-summary-old-adaptative'.E10" chart:label-cell-address="'bench-summary-old-adaptative'.E1:'bench-summary-old-adaptative'.E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bench-summary-old-adaptative'.B1:'bench-summary-old-adaptative'.B1</svg:desc>
                </draw:g>
              </table:table-cell>
              <table:table-cell office:value-type="string">
                <text:p>intermediate</text:p>
                <draw:g>
                  <svg:desc>'bench-summary-old-adaptative'.C1:'bench-summary-old-adaptative'.C1</svg:desc>
                </draw:g>
              </table:table-cell>
              <table:table-cell office:value-type="string">
                <text:p>complex</text:p>
                <draw:g>
                  <svg:desc>'bench-summary-old-adaptative'.D1:'bench-summary-old-adaptative'.D1</svg:desc>
                </draw:g>
              </table:table-cell>
              <table:table-cell office:value-type="string">
                <text:p>adaptative</text:p>
                <draw:g>
                  <svg:desc>'bench-summary-old-adaptative'.E1:'bench-summary-old-adaptative'.E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bench-summary-old-adaptative'.A2:'bench-summary-old-adaptative'.A10</svg:desc>
                </draw:g>
              </table:table-cell>
              <table:table-cell office:value-type="float" office:value="8.06">
                <text:p>8.06</text:p>
                <draw:g>
                  <svg:desc>'bench-summary-old-adaptative'.B2:'bench-summary-old-adaptative'.B10</svg:desc>
                </draw:g>
              </table:table-cell>
              <table:table-cell office:value-type="float" office:value="8.76">
                <text:p>8.76</text:p>
                <draw:g>
                  <svg:desc>'bench-summary-old-adaptative'.C2:'bench-summary-old-adaptative'.C10</svg:desc>
                </draw:g>
              </table:table-cell>
              <table:table-cell office:value-type="float" office:value="9.16">
                <text:p>9.16</text:p>
                <draw:g>
                  <svg:desc>'bench-summary-old-adaptative'.D2:'bench-summary-old-adaptative'.D10</svg:desc>
                </draw:g>
              </table:table-cell>
              <table:table-cell office:value-type="float" office:value="8.86">
                <text:p>8.86</text:p>
                <draw:g>
                  <svg:desc>'bench-summary-old-adaptative'.E2:'bench-summary-old-adaptative'.E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.8">
                <text:p>32.8</text:p>
              </table:table-cell>
              <table:table-cell office:value-type="float" office:value="34.38">
                <text:p>34.38</text:p>
              </table:table-cell>
              <table:table-cell office:value-type="float" office:value="65">
                <text:p>65</text:p>
              </table:table-cell>
              <table:table-cell office:value-type="float" office:value="33.42">
                <text:p>33.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8.58">
                <text:p>58.58</text:p>
              </table:table-cell>
              <table:table-cell office:value-type="float" office:value="55.6">
                <text:p>55.6</text:p>
              </table:table-cell>
              <table:table-cell office:value-type="float" office:value="92">
                <text:p>92</text:p>
              </table:table-cell>
              <table:table-cell office:value-type="float" office:value="55.32">
                <text:p>55.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0.48">
                <text:p>130.48</text:p>
              </table:table-cell>
              <table:table-cell office:value-type="float" office:value="101.88">
                <text:p>101.88</text:p>
              </table:table-cell>
              <table:table-cell office:value-type="float" office:value="196">
                <text:p>1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3.28">
                <text:p>423.28</text:p>
              </table:table-cell>
              <table:table-cell office:value-type="float" office:value="260.46">
                <text:p>260.46</text:p>
              </table:table-cell>
              <table:table-cell office:value-type="float" office:value="467">
                <text:p>467</text:p>
              </table:table-cell>
              <table:table-cell office:value-type="float" office:value="261.88">
                <text:p>261.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59.42">
                <text:p>1459.42</text:p>
              </table:table-cell>
              <table:table-cell office:value-type="float" office:value="695.87">
                <text:p>695.87</text:p>
              </table:table-cell>
              <table:table-cell office:value-type="float" office:value="1084">
                <text:p>1084</text:p>
              </table:table-cell>
              <table:table-cell office:value-type="float" office:value="687.33">
                <text:p>687.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319.54">
                <text:p>8319.54</text:p>
              </table:table-cell>
              <table:table-cell office:value-type="float" office:value="2815.98">
                <text:p>2815.98</text:p>
              </table:table-cell>
              <table:table-cell office:value-type="float" office:value="3017">
                <text:p>3017</text:p>
              </table:table-cell>
              <table:table-cell office:value-type="float" office:value="2813.91">
                <text:p>2813.9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407.27">
                <text:p>32407.27</text:p>
              </table:table-cell>
              <table:table-cell office:value-type="float" office:value="7038.61">
                <text:p>7038.61</text:p>
              </table:table-cell>
              <table:table-cell office:value-type="float" office:value="6784">
                <text:p>6784</text:p>
              </table:table-cell>
              <table:table-cell office:value-type="float" office:value="6879.11">
                <text:p>6879.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6667.39">
                <text:p>126667.39</text:p>
              </table:table-cell>
              <table:table-cell office:value-type="float" office:value="19368.61">
                <text:p>19368.61</text:p>
              </table:table-cell>
              <table:table-cell office:value-type="float" office:value="15068">
                <text:p>15068</text:p>
              </table:table-cell>
              <table:table-cell office:value-type="float" office:value="17228.32">
                <text:p>17228.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